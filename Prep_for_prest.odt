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153" officeooo:paragraph-rsid="000a2153"/>
    </style:style>
    <style:style style:name="P2" style:family="paragraph" style:parent-style-name="Standard">
      <style:text-properties officeooo:rsid="000a70c6" officeooo:paragraph-rsid="000a7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I<text:line-break/>Make them relate, -- they at a stage where they have advantage and opportunity where they can prepare and take direction toward any field they want research technical arts politics law or anything they want. </text:p>
      <text:p text:style-name="P1">Talk about balance between marks and working toward a field or industry. – Marks are necessary but they are bare minimum they don’t dictate your future but it makes it much more smooth to pursue. You must maintain mark while pursuing a goal.</text:p>
      <text:p text:style-name="P1"/>
      <text:p text:style-name="P1">Part II </text:p>
      <text:p text:style-name="P1">Develop curiosity, -- I would like to bring light toward a field I myself am interested in :Data Science.</text:p>
      <text:p text:style-name="P2">What is data science how it impacts what I allows us to do and take insight.</text:p>
      <text:p text:style-name="P2">Encourage toward exploring and pursuing a field.</text:p>
      <text:p text:style-name="P2"/>
      <text:p text:style-name="P2">Part III </text:p>
      <text:p text:style-name="P2">Talk about the Paper – this is what a research project look like, showing the process of collecting data cleaning analyzing visualizing validating. Then moving toward the topic talk what we wanted to answer initially and what we discovered |wnatted to find lag of price tansmission which was effectively zero, the better more interesting insigh came out to light which is mentioned in the paper|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5T18:57:44.071497585</meta:creation-date>
    <dc:date>2026-07-05T19:11:41.047765948</dc:date>
    <meta:editing-duration>PT14M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8" meta:word-count="189" meta:character-count="1097" meta:non-whitespace-character-count="911"/>
  </office:meta>
</office:document-meta>
</file>